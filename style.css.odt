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Reset and Base Styles */</text:p>
      <text:p text:style-name="Standard">* {</text:p>
      <text:p text:style-name="Standard"><text:s text:c="4"/>margin: 0;</text:p>
      <text:p text:style-name="Standard"><text:s text:c="4"/>padding: 0;</text:p>
      <text:p text:style-name="Standard"><text:s text:c="4"/>box-sizing: border-box;</text:p>
      <text:p text:style-name="Standard"><text:s text:c="4"/>font-family: 'Inter', sans-serif;</text:p>
      <text:p text:style-name="Standard">}</text:p>
      <text:p text:style-name="Standard"/>
      <text:p text:style-name="Standard">html {</text:p>
      <text:p text:style-name="Standard"><text:s text:c="4"/>scroll-behavior: smooth;</text:p>
      <text:p text:style-name="Standard">}</text:p>
      <text:p text:style-name="Standard"/>
      <text:p text:style-name="Standard">body {</text:p>
      <text:p text:style-name="Standard"><text:s text:c="4"/>background-color: #0B0F19; /* Deep slate blue/black */</text:p>
      <text:p text:style-name="Standard"><text:s text:c="4"/>color: #F3F4F6;</text:p>
      <text:p text:style-name="Standard"><text:s text:c="4"/>line-height: 1.6;</text:p>
      <text:p text:style-name="Standard">}</text:p>
      <text:p text:style-name="Standard"/>
      <text:p text:style-name="Standard">/* Header Navigation */</text:p>
      <text:p text:style-name="Standard">header {</text:p>
      <text:p text:style-name="Standard"><text:s text:c="4"/>background-color: rgba(11, 15, 25, 0.9);</text:p>
      <text:p text:style-name="Standard"><text:s text:c="4"/>backdrop-filter: blur(10px);</text:p>
      <text:p text:style-name="Standard"><text:s text:c="4"/>position: fixed;</text:p>
      <text:p text:style-name="Standard"><text:s text:c="4"/>width: 100%;</text:p>
      <text:p text:style-name="Standard"><text:s text:c="4"/>top: 0;</text:p>
      <text:p text:style-name="Standard"><text:s text:c="4"/>z-index: 1000;</text:p>
      <text:p text:style-name="Standard"><text:s text:c="4"/>border-bottom: 1px solid rgba(255, 255, 255, 0.1);</text:p>
      <text:p text:style-name="Standard">}</text:p>
      <text:p text:style-name="Standard"/>
      <text:p text:style-name="Standard">.nav-container {</text:p>
      <text:p text:style-name="Standard"><text:s text:c="4"/>max-width: 1200px;</text:p>
      <text:p text:style-name="Standard"><text:s text:c="4"/>margin: 0 auto;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<text:s text:c="4"/>padding: 20px;</text:p>
      <text:p text:style-name="Standard">}</text:p>
      <text:p text:style-name="Standard"/>
      <text:p text:style-name="Standard">.logo {</text:p>
      <text:p text:style-name="Standard"><text:s text:c="4"/>font-size: 24px;</text:p>
      <text:p text:style-name="Standard"><text:s text:c="4"/>font-weight: 700;</text:p>
      <text:p text:style-name="Standard"><text:s text:c="4"/>color: #FFFFFF;</text:p>
      <text:p text:style-name="Standard"><text:s text:c="4"/>text-decoration: none;</text:p>
      <text:p text:style-name="Standard"><text:s text:c="4"/>letter-spacing: 1px;</text:p>
      <text:p text:style-name="Standard">}</text:p>
      <text:p text:style-name="Standard"/>
      <text:p text:style-name="Standard">.logo span {</text:p>
      <text:p text:style-name="Standard"><text:s text:c="4"/>color: #3B82F6;</text:p>
      <text:p text:style-name="Standard">}</text:p>
      <text:p text:style-name="Standard"/>
      <text:p text:style-name="Standard">.nav-links {</text:p>
      <text:p text:style-name="Standard"><text:s text:c="4"/>list-style: none;</text:p>
      <text:p text:style-name="Standard"><text:soft-page-break/><text:s text:c="4"/>display: flex;</text:p>
      <text:p text:style-name="Standard"><text:s text:c="4"/>gap: 30px;</text:p>
      <text:p text:style-name="Standard">}</text:p>
      <text:p text:style-name="Standard"/>
      <text:p text:style-name="Standard">.nav-links a {</text:p>
      <text:p text:style-name="Standard"><text:s text:c="4"/>color: #9CA3AF;</text:p>
      <text:p text:style-name="Standard"><text:s text:c="4"/>text-decoration: none;</text:p>
      <text:p text:style-name="Standard"><text:s text:c="4"/>font-weight: 500;</text:p>
      <text:p text:style-name="Standard"><text:s text:c="4"/>transition: color 0.3s ease;</text:p>
      <text:p text:style-name="Standard">}</text:p>
      <text:p text:style-name="Standard"/>
      <text:p text:style-name="Standard">.nav-links a:hover {</text:p>
      <text:p text:style-name="Standard"><text:s text:c="4"/>color: #3B82F6;</text:p>
      <text:p text:style-name="Standard">}</text:p>
      <text:p text:style-name="Standard"/>
      <text:p text:style-name="Standard">/* Sections Setup */</text:p>
      <text:p text:style-name="Standard">section {</text:p>
      <text:p text:style-name="Standard"><text:s text:c="4"/>padding: 100px 20px 80px 20px;</text:p>
      <text:p text:style-name="Standard"><text:s text:c="4"/>max-width: 1200px;</text:p>
      <text:p text:style-name="Standard"><text:s text:c="4"/>margin: 0 auto;</text:p>
      <text:p text:style-name="Standard"><text:s text:c="4"/>scroll-margin-top: 80px;</text:p>
      <text:p text:style-name="Standard">}</text:p>
      <text:p text:style-name="Standard"/>
      <text:p text:style-name="Standard">/* Two-Column Flex/Grid Layouts */</text:p>
      <text:p text:style-name="Standard">.flex-container {</text:p>
      <text:p text:style-name="Standard"><text:s text:c="4"/>display: flex;</text:p>
      <text:p text:style-name="Standard"><text:s text:c="4"/>align-items: center;</text:p>
      <text:p text:style-name="Standard"><text:s text:c="4"/>gap: 50px;</text:p>
      <text:p text:style-name="Standard"><text:s text:c="4"/>justify-content: space-between;</text:p>
      <text:p text:style-name="Standard">}</text:p>
      <text:p text:style-name="Standard"/>
      <text:p text:style-name="Standard">.flex-text {</text:p>
      <text:p text:style-name="Standard"><text:s text:c="4"/>flex: 1;</text:p>
      <text:p text:style-name="Standard">}</text:p>
      <text:p text:style-name="Standard"/>
      <text:p text:style-name="Standard">.flex-image {</text:p>
      <text:p text:style-name="Standard"><text:s text:c="4"/>flex: 1;</text:p>
      <text:p text:style-name="Standard"><text:s text:c="4"/>display: flex;</text:p>
      <text:p text:style-name="Standard"><text:s text:c="4"/>justify-content: center;</text:p>
      <text:p text:style-name="Standard">}</text:p>
      <text:p text:style-name="Standard"/>
      <text:p text:style-name="Standard">.flex-image img {</text:p>
      <text:p text:style-name="Standard"><text:s text:c="4"/>width: 100%;</text:p>
      <text:p text:style-name="Standard"><text:s text:c="4"/>max-width: 500px;</text:p>
      <text:p text:style-name="Standard"><text:s text:c="4"/>border-radius: 16px;</text:p>
      <text:p text:style-name="Standard"><text:s text:c="4"/>border: 1px solid rgba(255, 255, 255, 0.1);</text:p>
      <text:p text:style-name="Standard"><text:s text:c="4"/>box-shadow: 0 20px 40px rgba(0, 0, 0, 0.5), 0 0 40px rgba(59, 130, 246, 0.1);</text:p>
      <text:p text:style-name="Standard"><text:s text:c="4"/>transition: transform 0.5s ease, box-shadow 0.5s ease;</text:p>
      <text:p text:style-name="Standard">}</text:p>
      <text:p text:style-name="Standard"/>
      <text:p text:style-name="Standard">.flex-image img:hover {</text:p>
      <text:p text:style-name="Standard"><text:s text:c="4"/>transform: translateY(-5px) scale(1.01);</text:p>
      <text:p text:style-name="Standard"><text:soft-page-break/><text:s text:c="4"/>box-shadow: 0 25px 50px rgba(0, 0, 0, 0.6), 0 0 50px rgba(59, 130, 246, 0.2);</text:p>
      <text:p text:style-name="Standard">}</text:p>
      <text:p text:style-name="Standard"/>
      <text:p text:style-name="Standard">/* Hero Section Specifics (Updated for text-only layout) */</text:p>
      <text:p text:style-name="Standard">.hero {</text:p>
      <text:p text:style-name="Standard"><text:s text:c="4"/>padding: 200px 20px 140px 20px;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<text:s text:c="4"/>text-align: center;</text:p>
      <text:p text:style-name="Standard">}</text:p>
      <text:p text:style-name="Standard"/>
      <text:p text:style-name="Standard">.hero-content {</text:p>
      <text:p text:style-name="Standard"><text:s text:c="4"/>max-width: 800px;</text:p>
      <text:p text:style-name="Standard"><text:s text:c="4"/>margin: 0 auto;</text:p>
      <text:p text:style-name="Standard">}</text:p>
      <text:p text:style-name="Standard"/>
      <text:p text:style-name="Standard">.hero h1 {</text:p>
      <text:p text:style-name="Standard"><text:s text:c="4"/>font-size: 48px;</text:p>
      <text:p text:style-name="Standard"><text:s text:c="4"/>font-weight: 800;</text:p>
      <text:p text:style-name="Standard"><text:s text:c="4"/>line-height: 1.2;</text:p>
      <text:p text:style-name="Standard"><text:s text:c="4"/>margin-bottom: 25px;</text:p>
      <text:p text:style-name="Standard"><text:s text:c="4"/>color: #FFFFFF;</text:p>
      <text:p text:style-name="Standard">}</text:p>
      <text:p text:style-name="Standard"/>
      <text:p text:style-name="Standard">.hero h1 span {</text:p>
      <text:p text:style-name="Standard"><text:s text:c="4"/>background: linear-gradient(to right, #3B82F6, #8B5CF6);</text:p>
      <text:p text:style-name="Standard"><text:s text:c="4"/>-webkit-background-clip: text;</text:p>
      <text:p text:style-name="Standard"><text:s text:c="4"/>-webkit-text-fill-color: transparent;</text:p>
      <text:p text:style-name="Standard">}</text:p>
      <text:p text:style-name="Standard"/>
      <text:p text:style-name="Standard">.hero p {</text:p>
      <text:p text:style-name="Standard"><text:s text:c="4"/>font-size: 18px;</text:p>
      <text:p text:style-name="Standard"><text:s text:c="4"/>color: #9CA3AF;</text:p>
      <text:p text:style-name="Standard"><text:s text:c="4"/>margin-bottom: 40px;</text:p>
      <text:p text:style-name="Standard"><text:s text:c="4"/>line-height: 1.8;</text:p>
      <text:p text:style-name="Standard">}</text:p>
      <text:p text:style-name="Standard"/>
      <text:p text:style-name="Standard">/* Buttons */</text:p>
      <text:p text:style-name="Standard">.btn {</text:p>
      <text:p text:style-name="Standard"><text:s text:c="4"/>display: inline-block;</text:p>
      <text:p text:style-name="Standard"><text:s text:c="4"/>padding: 12px 30px;</text:p>
      <text:p text:style-name="Standard"><text:s text:c="4"/>background-color: #3B82F6;</text:p>
      <text:p text:style-name="Standard"><text:s text:c="4"/>color: #FFFFFF;</text:p>
      <text:p text:style-name="Standard"><text:s text:c="4"/>text-decoration: none;</text:p>
      <text:p text:style-name="Standard"><text:s text:c="4"/>border-radius: 6px;</text:p>
      <text:p text:style-name="Standard"><text:s text:c="4"/>font-weight: 600;</text:p>
      <text:p text:style-name="Standard"><text:s text:c="4"/>transition: background-color 0.3s ease;</text:p>
      <text:p text:style-name="Standard"><text:s text:c="4"/>border: none;</text:p>
      <text:p text:style-name="Standard"><text:s text:c="4"/>cursor: pointer;</text:p>
      <text:p text:style-name="Standard">}</text:p>
      <text:p text:style-name="Standard"/>
      <text:p text:style-name="Standard"><text:soft-page-break/>.btn:hover {</text:p>
      <text:p text:style-name="Standard"><text:s text:c="4"/>background-color: #2563EB;</text:p>
      <text:p text:style-name="Standard">}</text:p>
      <text:p text:style-name="Standard"/>
      <text:p text:style-name="Standard">.section-title {</text:p>
      <text:p text:style-name="Standard"><text:s text:c="4"/>font-size: 32px;</text:p>
      <text:p text:style-name="Standard"><text:s text:c="4"/>margin-bottom: 50px;</text:p>
      <text:p text:style-name="Standard"><text:s text:c="4"/>color: #FFFFFF;</text:p>
      <text:p text:style-name="Standard"><text:s text:c="4"/>text-align: center;</text:p>
      <text:p text:style-name="Standard">}</text:p>
      <text:p text:style-name="Standard"/>
      <text:p text:style-name="Standard">.section-title span {</text:p>
      <text:p text:style-name="Standard"><text:s text:c="4"/>color: #3B82F6;</text:p>
      <text:p text:style-name="Standard">}</text:p>
      <text:p text:style-name="Standard"/>
      <text:p text:style-name="Standard">/* Grid Layout */</text:p>
      <text:p text:style-name="Standard">.grid {</text:p>
      <text:p text:style-name="Standard"><text:s text:c="4"/>display: grid;</text:p>
      <text:p text:style-name="Standard"><text:s text:c="4"/>grid-template-columns: repeat(auto-fit, minmax(300px, 1fr));</text:p>
      <text:p text:style-name="Standard"><text:s text:c="4"/>gap: 30px;</text:p>
      <text:p text:style-name="Standard">}</text:p>
      <text:p text:style-name="Standard"/>
      <text:p text:style-name="Standard">.card {</text:p>
      <text:p text:style-name="Standard"><text:s text:c="4"/>background-color: #111827;</text:p>
      <text:p text:style-name="Standard"><text:s text:c="4"/>border: 1px solid rgba(255, 255, 255, 0.05);</text:p>
      <text:p text:style-name="Standard"><text:s text:c="4"/>padding: 40px 30px;</text:p>
      <text:p text:style-name="Standard"><text:s text:c="4"/>border-radius: 12px;</text:p>
      <text:p text:style-name="Standard"><text:s text:c="4"/>transition: transform 0.3s ease, border-color 0.3s ease;</text:p>
      <text:p text:style-name="Standard">}</text:p>
      <text:p text:style-name="Standard"/>
      <text:p text:style-name="Standard">.card:hover {</text:p>
      <text:p text:style-name="Standard"><text:s text:c="4"/>transform: translateY(-5px);</text:p>
      <text:p text:style-name="Standard"><text:s text:c="4"/>border-color: rgba(59, 130, 246, 0.3);</text:p>
      <text:p text:style-name="Standard">}</text:p>
      <text:p text:style-name="Standard"/>
      <text:p text:style-name="Standard">.card h3 {</text:p>
      <text:p text:style-name="Standard"><text:s text:c="4"/>font-size: 20px;</text:p>
      <text:p text:style-name="Standard"><text:s text:c="4"/>margin-bottom: 15px;</text:p>
      <text:p text:style-name="Standard"><text:s text:c="4"/>color: #FFFFFF;</text:p>
      <text:p text:style-name="Standard">}</text:p>
      <text:p text:style-name="Standard"/>
      <text:p text:style-name="Standard">.card p {</text:p>
      <text:p text:style-name="Standard"><text:s text:c="4"/>color: #9CA3AF;</text:p>
      <text:p text:style-name="Standard"><text:s text:c="4"/>font-size: 15px;</text:p>
      <text:p text:style-name="Standard">}</text:p>
      <text:p text:style-name="Standard"/>
      <text:p text:style-name="Standard">/* Contact Section */</text:p>
      <text:p text:style-name="Standard">.contact-container {</text:p>
      <text:p text:style-name="Standard"><text:s text:c="4"/>display: grid;</text:p>
      <text:p text:style-name="Standard"><text:s text:c="4"/>grid-template-columns: 1fr 1fr;</text:p>
      <text:p text:style-name="Standard"><text:s text:c="4"/>gap: 50px;</text:p>
      <text:p text:style-name="Standard"><text:s text:c="4"/>align-items: start;</text:p>
      <text:p text:style-name="Standard"><text:soft-page-break/>}</text:p>
      <text:p text:style-name="Standard"/>
      <text:p text:style-name="Standard">.contact-info h3 {</text:p>
      <text:p text:style-name="Standard"><text:s text:c="4"/>font-size: 24px;</text:p>
      <text:p text:style-name="Standard"><text:s text:c="4"/>color: #FFFFFF;</text:p>
      <text:p text:style-name="Standard"><text:s text:c="4"/>margin-bottom: 15px;</text:p>
      <text:p text:style-name="Standard">}</text:p>
      <text:p text:style-name="Standard"/>
      <text:p text:style-name="Standard">.contact-info p {</text:p>
      <text:p text:style-name="Standard"><text:s text:c="4"/>color: #9CA3AF;</text:p>
      <text:p text:style-name="Standard"><text:s text:c="4"/>margin-bottom: 30px;</text:p>
      <text:p text:style-name="Standard">}</text:p>
      <text:p text:style-name="Standard"/>
      <text:p text:style-name="Standard">.info-details {</text:p>
      <text:p text:style-name="Standard"><text:s text:c="4"/>margin-top: 20px;</text:p>
      <text:p text:style-name="Standard">}</text:p>
      <text:p text:style-name="Standard"/>
      <text:p text:style-name="Standard">.info-item {</text:p>
      <text:p text:style-name="Standard"><text:s text:c="4"/>margin-bottom: 20px;</text:p>
      <text:p text:style-name="Standard"><text:s text:c="4"/>color: #F3F4F6;</text:p>
      <text:p text:style-name="Standard">}</text:p>
      <text:p text:style-name="Standard"/>
      <text:p text:style-name="Standard">.info-item strong {</text:p>
      <text:p text:style-name="Standard"><text:s text:c="4"/>color: #3B82F6;</text:p>
      <text:p text:style-name="Standard">}</text:p>
      <text:p text:style-name="Standard"/>
      <text:p text:style-name="Standard">/* New: Style links within contact info items */</text:p>
      <text:p text:style-name="Standard">.info-item a {</text:p>
      <text:p text:style-name="Standard"><text:s text:c="4"/>color: #9CA3AF;</text:p>
      <text:p text:style-name="Standard"><text:s text:c="4"/>text-decoration: none;</text:p>
      <text:p text:style-name="Standard"><text:s text:c="4"/>transition: color 0.3s ease;</text:p>
      <text:p text:style-name="Standard">}</text:p>
      <text:p text:style-name="Standard"/>
      <text:p text:style-name="Standard">.info-item a:hover {</text:p>
      <text:p text:style-name="Standard"><text:s text:c="4"/>color: #3B82F6;</text:p>
      <text:p text:style-name="Standard">}</text:p>
      <text:p text:style-name="Standard"/>
      <text:p text:style-name="Standard">.contact-form {</text:p>
      <text:p text:style-name="Standard"><text:s text:c="4"/>background-color: #111827;</text:p>
      <text:p text:style-name="Standard"><text:s text:c="4"/>padding: 40px;</text:p>
      <text:p text:style-name="Standard"><text:s text:c="4"/>border-radius: 12px;</text:p>
      <text:p text:style-name="Standard"><text:s text:c="4"/>border: 1px solid rgba(255, 255, 255, 0.05);</text:p>
      <text:p text:style-name="Standard">}</text:p>
      <text:p text:style-name="Standard"/>
      <text:p text:style-name="Standard">.form-group {</text:p>
      <text:p text:style-name="Standard"><text:s text:c="4"/>margin-bottom: 20px;</text:p>
      <text:p text:style-name="Standard">}</text:p>
      <text:p text:style-name="Standard"/>
      <text:p text:style-name="Standard">.form-group label {</text:p>
      <text:p text:style-name="Standard"><text:s text:c="4"/>display: block;</text:p>
      <text:p text:style-name="Standard"><text:s text:c="4"/>color: #9CA3AF;</text:p>
      <text:p text:style-name="Standard"><text:s text:c="4"/>margin-bottom: 8px;</text:p>
      <text:p text:style-name="Standard"><text:soft-page-break/><text:s text:c="4"/>font-size: 14px;</text:p>
      <text:p text:style-name="Standard">}</text:p>
      <text:p text:style-name="Standard"/>
      <text:p text:style-name="Standard">.form-group input, .form-group textarea {</text:p>
      <text:p text:style-name="Standard"><text:s text:c="4"/>width: 100%;</text:p>
      <text:p text:style-name="Standard"><text:s text:c="4"/>padding: 12px;</text:p>
      <text:p text:style-name="Standard"><text:s text:c="4"/>background-color: #1F2937;</text:p>
      <text:p text:style-name="Standard"><text:s text:c="4"/>border: 1px solid rgba(255, 255, 255, 0.1);</text:p>
      <text:p text:style-name="Standard"><text:s text:c="4"/>border-radius: 6px;</text:p>
      <text:p text:style-name="Standard"><text:s text:c="4"/>color: #FFFFFF;</text:p>
      <text:p text:style-name="Standard"><text:s text:c="4"/>font-size: 15px;</text:p>
      <text:p text:style-name="Standard">}</text:p>
      <text:p text:style-name="Standard"/>
      <text:p text:style-name="Standard">.form-group input:focus, .form-group textarea:focus {</text:p>
      <text:p text:style-name="Standard"><text:s text:c="4"/>outline: none;</text:p>
      <text:p text:style-name="Standard"><text:s text:c="4"/>border-color: #3B82F6;</text:p>
      <text:p text:style-name="Standard">}</text:p>
      <text:p text:style-name="Standard"/>
      <text:p text:style-name="Standard">/* Footer */</text:p>
      <text:p text:style-name="Standard">footer {</text:p>
      <text:p text:style-name="Standard"><text:s text:c="4"/>border-top: 1px solid rgba(255, 255, 255, 0.1);</text:p>
      <text:p text:style-name="Standard"><text:s text:c="4"/>padding: 40px 20px;</text:p>
      <text:p text:style-name="Standard"><text:s text:c="4"/>text-align: center;</text:p>
      <text:p text:style-name="Standard"><text:s text:c="4"/>color: #6B7280;</text:p>
      <text:p text:style-name="Standard"><text:s text:c="4"/>font-size: 14px;</text:p>
      <text:p text:style-name="Standard"><text:s text:c="4"/>background-color: #0B0F19;</text:p>
      <text:p text:style-name="Standard">}</text:p>
      <text:p text:style-name="Standard"/>
      <text:p text:style-name="Standard">/* Responsive adjustment */</text:p>
      <text:p text:style-name="Standard">@media (max-width: 900px) {</text:p>
      <text:p text:style-name="Standard"><text:s text:c="4"/>.flex-container {</text:p>
      <text:p text:style-name="Standard"><text:s text:c="8"/>flex-direction: column;</text:p>
      <text:p text:style-name="Standard"><text:s text:c="8"/>text-align: center;</text:p>
      <text:p text:style-name="Standard"><text:s text:c="8"/>gap: 40px;</text:p>
      <text:p text:style-name="Standard"><text:s text:c="4"/>}</text:p>
      <text:p text:style-name="Standard"><text:s text:c="4"/>.contact-container {</text:p>
      <text:p text:style-name="Standard"><text:s text:c="8"/>grid-template-columns: 1fr;</text:p>
      <text:p text:style-name="Standard"><text:s text:c="4"/>}</text:p>
      <text:p text:style-name="Standard"><text:s text:c="4"/>.hero h1 {</text:p>
      <text:p text:style-name="Standard"><text:s text:c="8"/>font-size: 36px;</text:p>
      <text:p text:style-name="Standard"><text:s text:c="4"/>}</text:p>
      <text:p text:style-name="Standard"><text:s text:c="4"/>.hero {</text:p>
      <text:p text:style-name="Standard"><text:s text:c="8"/>padding: 140px 20px 100px 20px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5T11:11:05.800921105</meta:creation-date>
    <dc:date>2026-06-05T11:11:54.136685176</dc:date>
    <meta:editing-duration>PT51S</meta:editing-duration>
    <meta:editing-cycles>1</meta:editing-cycles>
    <meta:document-statistic meta:table-count="0" meta:image-count="0" meta:object-count="0" meta:page-count="6" meta:paragraph-count="261" meta:word-count="639" meta:character-count="5073" meta:non-whitespace-character-count="4031"/>
    <meta:generator>LibreOffice/24.2.7.2$Linux_X86_64 LibreOffice_project/420$Build-2</meta:generator>
  </office:meta>
</office:document-meta>
</file>